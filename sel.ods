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64in"/>
    </style:style>
    <style:style style:name="co2" style:family="table-column">
      <style:table-column-properties fo:break-before="auto" style:column-width="0.9555in"/>
    </style:style>
    <style:style style:name="co3" style:family="table-column">
      <style:table-column-properties fo:break-before="auto" style:column-width="0.2693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ld fishe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New fisher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L ALL 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gion 5 is big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L ALL 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mall regio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L AU 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gion 5 is big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L AU 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mall regio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S ASS 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eanic PS AS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S ASS 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mall sampl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S UNA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eanic PS U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S UNA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mall sampl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dex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dex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ndex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ndex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ndex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ndex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2T08:36:13.543584318</meta:creation-date>
    <dc:date>2026-06-22T11:35:32.234481095</dc:date>
    <meta:editing-duration>PT20M23S</meta:editing-duration>
    <meta:editing-cycles>1</meta:editing-cycles>
    <meta:document-statistic meta:table-count="1" meta:cell-count="62" meta:object-count="0"/>
    <meta:generator>LibreOffice/24.2.7.2$Linux_X86_64 LibreOffice_project/420$Build-2</meta:generator>
  </office:meta>
</office:document-meta>
</file>